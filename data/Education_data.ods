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543in"/>
    </style:style>
    <style:style style:name="co7" style:family="table-column">
      <style:table-column-properties fo:break-before="auto" style:column-width="0.8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ucation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educ</text:p>
          </table:table-cell>
          <table:table-cell office:value-type="string" calcext:value-type="string">
            <text:p>exper</text:p>
          </table:table-cell>
          <table:table-cell office:value-type="string" calcext:value-type="string">
            <text:p>nearc4</text:p>
          </table:table-cell>
          <table:table-cell office:value-type="string" calcext:value-type="string">
            <text:p>fatheduc</text:p>
          </table:table-cell>
          <table:table-cell office:value-type="string" calcext:value-type="string">
            <text:p>mothedu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9" calcext:value-type="float">
            <text:p>7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9" calcext:value-type="float">
            <text:p>6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4" calcext:value-type="float">
            <text:p>94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6" calcext:value-type="float">
            <text:p>7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4" calcext:value-type="float">
            <text:p>8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6" calcext:value-type="float">
            <text:p>114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1" calcext:value-type="float">
            <text:p>6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8" calcext:value-type="float">
            <text:p>5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63" calcext:value-type="float">
            <text:p>15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74" calcext:value-type="float">
            <text:p>77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3" calcext:value-type="float">
            <text:p>6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8" calcext:value-type="float">
            <text:p>5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27" calcext:value-type="float">
            <text:p>6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2" calcext:value-type="float">
            <text:p>10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1" calcext:value-type="float">
            <text:p>60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43" calcext:value-type="float">
            <text:p>114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0" calcext:value-type="float">
            <text:p>8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6" calcext:value-type="float">
            <text:p>8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69" calcext:value-type="float">
            <text:p>76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19" calcext:value-type="float">
            <text:p>6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69" calcext:value-type="float">
            <text:p>7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1" calcext:value-type="float">
            <text:p>11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7" calcext:value-type="float">
            <text:p>8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76" calcext:value-type="float">
            <text:p>107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5" calcext:value-type="float">
            <text:p>100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72" calcext:value-type="float">
            <text:p>97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5" calcext:value-type="float">
            <text:p>6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3" calcext:value-type="float">
            <text:p>79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5" calcext:value-type="float">
            <text:p>7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37" calcext:value-type="float">
            <text:p>73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4" calcext:value-type="float">
            <text:p>6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3" calcext:value-type="float">
            <text:p>69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25" calcext:value-type="float">
            <text:p>6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15" calcext:value-type="float">
            <text:p>11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26" calcext:value-type="float">
            <text:p>7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5" calcext:value-type="float">
            <text:p>126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3" calcext:value-type="float">
            <text:p>6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" calcext:value-type="float">
            <text:p>14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26" calcext:value-type="float">
            <text:p>10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54" calcext:value-type="float">
            <text:p>11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75" calcext:value-type="float">
            <text:p>4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82" calcext:value-type="float">
            <text:p>128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88" calcext:value-type="float">
            <text:p>5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29" calcext:value-type="float">
            <text:p>9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51" calcext:value-type="float">
            <text:p>55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1" calcext:value-type="float">
            <text:p>88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64" calcext:value-type="float">
            <text:p>86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4" calcext:value-type="float">
            <text:p>4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95" calcext:value-type="float">
            <text:p>69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04" calcext:value-type="float">
            <text:p>240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58" calcext:value-type="float">
            <text:p>75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86" calcext:value-type="float">
            <text:p>98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14" calcext:value-type="float">
            <text:p>7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17" calcext:value-type="float">
            <text:p>9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41" calcext:value-type="float">
            <text:p>64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10" calcext:value-type="float">
            <text:p>10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" calcext:value-type="float">
            <text:p>119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5" calcext:value-type="float">
            <text:p>6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23" calcext:value-type="float">
            <text:p>19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37" calcext:value-type="float">
            <text:p>83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65" calcext:value-type="float">
            <text:p>86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17" calcext:value-type="float">
            <text:p>8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21" calcext:value-type="float">
            <text:p>7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3" calcext:value-type="float">
            <text:p>9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79" calcext:value-type="float">
            <text:p>37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709" calcext:value-type="float">
            <text:p>170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10" calcext:value-type="float">
            <text:p>10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46" calcext:value-type="float">
            <text:p>8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02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44" calcext:value-type="float">
            <text:p>22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" calcext:value-type="float">
            <text:p>14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62" calcext:value-type="float">
            <text:p>12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38" calcext:value-type="float">
            <text:p>5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8" calcext:value-type="float">
            <text:p>58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01" calcext:value-type="float">
            <text:p>8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23" calcext:value-type="float">
            <text:p>19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15" calcext:value-type="float">
            <text:p>6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15" calcext:value-type="float">
            <text:p>8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65" calcext:value-type="float">
            <text:p>86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1" calcext:value-type="float">
            <text:p>85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89" calcext:value-type="float">
            <text:p>88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14" calcext:value-type="float">
            <text:p>10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41" calcext:value-type="float">
            <text:p>64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33" calcext:value-type="float">
            <text:p>33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92" calcext:value-type="float">
            <text:p>69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89" calcext:value-type="float">
            <text:p>98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2" calcext:value-type="float">
            <text:p>100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41" calcext:value-type="float">
            <text:p>124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54" calcext:value-type="float">
            <text:p>11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02" calcext:value-type="float">
            <text:p>140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44" calcext:value-type="float">
            <text:p>10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24" calcext:value-type="float">
            <text:p>5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25" calcext:value-type="float">
            <text:p>7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29" calcext:value-type="float">
            <text:p>6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75" calcext:value-type="float">
            <text:p>8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39" calcext:value-type="float">
            <text:p>63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04" calcext:value-type="float">
            <text:p>5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46" calcext:value-type="float">
            <text:p>5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42" calcext:value-type="float">
            <text:p>5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" calcext:value-type="float">
            <text:p>14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79" calcext:value-type="float">
            <text:p>8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63" calcext:value-type="float">
            <text:p>8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92" calcext:value-type="float">
            <text:p>69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46" calcext:value-type="float">
            <text:p>74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26" calcext:value-type="float">
            <text:p>7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46" calcext:value-type="float">
            <text:p>64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57" calcext:value-type="float">
            <text:p>55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84" calcext:value-type="float">
            <text:p>5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35" calcext:value-type="float">
            <text:p>6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17" calcext:value-type="float">
            <text:p>5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96" calcext:value-type="float">
            <text:p>59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24" calcext:value-type="float">
            <text:p>9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25" calcext:value-type="float">
            <text:p>10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26" calcext:value-type="float">
            <text:p>10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38" calcext:value-type="float">
            <text:p>15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23" calcext:value-type="float">
            <text:p>9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16" calcext:value-type="float">
            <text:p>11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86" calcext:value-type="float">
            <text:p>68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49" calcext:value-type="float">
            <text:p>6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07" calcext:value-type="float">
            <text:p>70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43" calcext:value-type="float">
            <text:p>104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67" calcext:value-type="float">
            <text:p>66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92" calcext:value-type="float">
            <text:p>69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833" calcext:value-type="float">
            <text:p>8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" calcext:value-type="float">
            <text:p>14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46" calcext:value-type="float">
            <text:p>134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82" calcext:value-type="float">
            <text:p>10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683" calcext:value-type="float">
            <text:p>16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55" calcext:value-type="float">
            <text:p>105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62" calcext:value-type="float">
            <text:p>96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" calcext:value-type="float">
            <text:p>14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17" calcext:value-type="float">
            <text:p>7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79" calcext:value-type="float">
            <text:p>67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34" calcext:value-type="float">
            <text:p>5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11" calcext:value-type="float">
            <text:p>3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60" calcext:value-type="float">
            <text:p>66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05" calcext:value-type="float">
            <text:p>70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" calcext:value-type="float">
            <text:p>14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202" calcext:value-type="float">
            <text:p>12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962" calcext:value-type="float">
            <text:p>96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41" calcext:value-type="float">
            <text:p>64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84" calcext:value-type="float">
            <text:p>6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73" calcext:value-type="float">
            <text:p>6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25" calcext:value-type="float">
            <text:p>14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11" calcext:value-type="float">
            <text:p>11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55" calcext:value-type="float">
            <text:p>115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864" calcext:value-type="float">
            <text:p>8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18" calcext:value-type="float">
            <text:p>8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02" calcext:value-type="float">
            <text:p>7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34" calcext:value-type="float">
            <text:p>10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079" calcext:value-type="float">
            <text:p>10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923" calcext:value-type="float">
            <text:p>19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01" calcext:value-type="float">
            <text:p>6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202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94" calcext:value-type="float">
            <text:p>109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850" calcext:value-type="float">
            <text:p>85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74" calcext:value-type="float">
            <text:p>47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56" calcext:value-type="float">
            <text:p>6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150" calcext:value-type="float">
            <text:p>11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41" calcext:value-type="float">
            <text:p>64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101" calcext:value-type="float">
            <text:p>11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81" calcext:value-type="float">
            <text:p>7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705" calcext:value-type="float">
            <text:p>7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33" calcext:value-type="float">
            <text:p>8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008" calcext:value-type="float">
            <text:p>100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77" calcext:value-type="float">
            <text:p>6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97" calcext:value-type="float">
            <text:p>79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69" calcext:value-type="float">
            <text:p>7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911" calcext:value-type="float">
            <text:p>9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36" calcext:value-type="float">
            <text:p>4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42" calcext:value-type="float">
            <text:p>5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769" calcext:value-type="float">
            <text:p>7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08" calcext:value-type="float">
            <text:p>80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24" calcext:value-type="float">
            <text:p>6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924" calcext:value-type="float">
            <text:p>9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187" calcext:value-type="float">
            <text:p>118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65" calcext:value-type="float">
            <text:p>56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64" calcext:value-type="float">
            <text:p>96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374" calcext:value-type="float">
            <text:p>137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57" calcext:value-type="float">
            <text:p>45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21" calcext:value-type="float">
            <text:p>7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67" calcext:value-type="float">
            <text:p>66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320" calcext:value-type="float">
            <text:p>13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17" calcext:value-type="float">
            <text:p>8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28" calcext:value-type="float">
            <text:p>6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84" calcext:value-type="float">
            <text:p>68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319" calcext:value-type="float">
            <text:p>13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92" calcext:value-type="float">
            <text:p>119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17" calcext:value-type="float">
            <text:p>81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22" calcext:value-type="float">
            <text:p>7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64" calcext:value-type="float">
            <text:p>66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39" calcext:value-type="float">
            <text:p>5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29" calcext:value-type="float">
            <text:p>9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66" calcext:value-type="float">
            <text:p>2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25" calcext:value-type="float">
            <text:p>6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66" calcext:value-type="float">
            <text:p>76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18" calcext:value-type="float">
            <text:p>91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67" calcext:value-type="float">
            <text:p>11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58" calcext:value-type="float">
            <text:p>65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09" calcext:value-type="float">
            <text:p>90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49" calcext:value-type="float">
            <text:p>10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25" calcext:value-type="float">
            <text:p>9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80" calcext:value-type="float">
            <text:p>138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815" calcext:value-type="float">
            <text:p>8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759" calcext:value-type="float">
            <text:p>75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995" calcext:value-type="float">
            <text:p>99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92" calcext:value-type="float">
            <text:p>6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2" calcext:value-type="float">
            <text:p>12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789" calcext:value-type="float">
            <text:p>7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251" calcext:value-type="float">
            <text:p>12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85" calcext:value-type="float">
            <text:p>48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731" calcext:value-type="float">
            <text:p>7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49" calcext:value-type="float">
            <text:p>44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35" calcext:value-type="float">
            <text:p>6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250" calcext:value-type="float">
            <text:p>125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913" calcext:value-type="float">
            <text:p>9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913" calcext:value-type="float">
            <text:p>9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92" calcext:value-type="float">
            <text:p>69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08" calcext:value-type="float">
            <text:p>80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42" calcext:value-type="float">
            <text:p>64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773" calcext:value-type="float">
            <text:p>77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894" calcext:value-type="float">
            <text:p>89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987" calcext:value-type="float">
            <text:p>9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866" calcext:value-type="float">
            <text:p>86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115" calcext:value-type="float">
            <text:p>11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039" calcext:value-type="float">
            <text:p>10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15" calcext:value-type="float">
            <text:p>3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713" calcext:value-type="float">
            <text:p>7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58" calcext:value-type="float">
            <text:p>105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788" calcext:value-type="float">
            <text:p>7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808" calcext:value-type="float">
            <text:p>80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03" calcext:value-type="float">
            <text:p>6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757" calcext:value-type="float">
            <text:p>75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554" calcext:value-type="float">
            <text:p>55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797" calcext:value-type="float">
            <text:p>79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923" calcext:value-type="float">
            <text:p>9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725" calcext:value-type="float">
            <text:p>7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563" calcext:value-type="float">
            <text:p>56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373" calcext:value-type="float">
            <text:p>37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859" calcext:value-type="float">
            <text:p>8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49" calcext:value-type="float">
            <text:p>6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955" calcext:value-type="float">
            <text:p>95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298" calcext:value-type="float">
            <text:p>12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053" calcext:value-type="float">
            <text:p>10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502" calcext:value-type="float">
            <text:p>150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846" calcext:value-type="float">
            <text:p>84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759" calcext:value-type="float">
            <text:p>7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57" calcext:value-type="float">
            <text:p>65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535" calcext:value-type="float">
            <text:p>5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74" calcext:value-type="float">
            <text:p>67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913" calcext:value-type="float">
            <text:p>9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745" calcext:value-type="float">
            <text:p>74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721" calcext:value-type="float">
            <text:p>7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865" calcext:value-type="float">
            <text:p>8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796" calcext:value-type="float">
            <text:p>79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707" calcext:value-type="float">
            <text:p>70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202" calcext:value-type="float">
            <text:p>12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455" calcext:value-type="float">
            <text:p>4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61" calcext:value-type="float">
            <text:p>66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93" calcext:value-type="float">
            <text:p>69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577" calcext:value-type="float">
            <text:p>57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596" calcext:value-type="float">
            <text:p>5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374" calcext:value-type="float">
            <text:p>137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269" calcext:value-type="float">
            <text:p>126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583" calcext:value-type="float">
            <text:p>58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923" calcext:value-type="float">
            <text:p>19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748" calcext:value-type="float">
            <text:p>17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736" calcext:value-type="float">
            <text:p>73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478" calcext:value-type="float">
            <text:p>4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505" calcext:value-type="float">
            <text:p>5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62" calcext:value-type="float">
            <text:p>4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909" calcext:value-type="float">
            <text:p>90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155" calcext:value-type="float">
            <text:p>11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540" calcext:value-type="float">
            <text:p>54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475" calcext:value-type="float">
            <text:p>4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98" calcext:value-type="float">
            <text:p>3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28" calcext:value-type="float">
            <text:p>8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545" calcext:value-type="float">
            <text:p>54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742" calcext:value-type="float">
            <text:p>7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684" calcext:value-type="float">
            <text:p>68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142" calcext:value-type="float">
            <text:p>11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16" calcext:value-type="float">
            <text:p>6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839" calcext:value-type="float">
            <text:p>83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475" calcext:value-type="float">
            <text:p>47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945" calcext:value-type="float">
            <text:p>94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012" calcext:value-type="float">
            <text:p>10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833" calcext:value-type="float">
            <text:p>8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962" calcext:value-type="float">
            <text:p>96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855" calcext:value-type="float">
            <text:p>85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374" calcext:value-type="float">
            <text:p>137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452" calcext:value-type="float">
            <text:p>4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511" calcext:value-type="float">
            <text:p>5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821" calcext:value-type="float">
            <text:p>8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462" calcext:value-type="float">
            <text:p>46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07" calcext:value-type="float">
            <text:p>50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635" calcext:value-type="float">
            <text:p>16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1106" calcext:value-type="float">
            <text:p>11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801" calcext:value-type="float">
            <text:p>8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758" calcext:value-type="float">
            <text:p>75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979" calcext:value-type="float">
            <text:p>19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565" calcext:value-type="float">
            <text:p>56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1097" calcext:value-type="float">
            <text:p>10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778" calcext:value-type="float">
            <text:p>77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824" calcext:value-type="float">
            <text:p>8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692" calcext:value-type="float">
            <text:p>69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851" calcext:value-type="float">
            <text:p>8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795" calcext:value-type="float">
            <text:p>7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869" calcext:value-type="float">
            <text:p>8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385" calcext:value-type="float">
            <text:p>138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657" calcext:value-type="float">
            <text:p>65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200" calcext:value-type="float">
            <text:p>12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115" calcext:value-type="float">
            <text:p>21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833" calcext:value-type="float">
            <text:p>8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467" calcext:value-type="float">
            <text:p>4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666" calcext:value-type="float">
            <text:p>66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785" calcext:value-type="float">
            <text:p>78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667" calcext:value-type="float">
            <text:p>6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97" calcext:value-type="float">
            <text:p>69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309" calcext:value-type="float">
            <text:p>130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627" calcext:value-type="float">
            <text:p>6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983" calcext:value-type="float">
            <text:p>98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938" calcext:value-type="float">
            <text:p>9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996" calcext:value-type="float">
            <text:p>99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582" calcext:value-type="float">
            <text:p>58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628" calcext:value-type="float">
            <text:p>6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716" calcext:value-type="float">
            <text:p>7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106" calcext:value-type="float">
            <text:p>110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962" calcext:value-type="float">
            <text:p>96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692" calcext:value-type="float">
            <text:p>69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336" calcext:value-type="float">
            <text:p>133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443" calcext:value-type="float">
            <text:p>144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090" calcext:value-type="float">
            <text:p>109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14" calcext:value-type="float">
            <text:p>10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771" calcext:value-type="float">
            <text:p>7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674" calcext:value-type="float">
            <text:p>67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817" calcext:value-type="float">
            <text:p>8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615" calcext:value-type="float">
            <text:p>6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1063" calcext:value-type="float">
            <text:p>106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41" calcext:value-type="float">
            <text:p>3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394" calcext:value-type="float">
            <text:p>139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548" calcext:value-type="float">
            <text:p>5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657" calcext:value-type="float">
            <text:p>6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841" calcext:value-type="float">
            <text:p>8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510" calcext:value-type="float">
            <text:p>5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631" calcext:value-type="float">
            <text:p>63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666" calcext:value-type="float">
            <text:p>66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647" calcext:value-type="float">
            <text:p>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25" calcext:value-type="float">
            <text:p>6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919" calcext:value-type="float">
            <text:p>9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785" calcext:value-type="float">
            <text:p>7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925" calcext:value-type="float">
            <text:p>9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470" calcext:value-type="float">
            <text:p>4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541" calcext:value-type="float">
            <text:p>5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852" calcext:value-type="float">
            <text:p>8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739" calcext:value-type="float">
            <text:p>7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417" calcext:value-type="float">
            <text:p>4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635" calcext:value-type="float">
            <text:p>6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598" calcext:value-type="float">
            <text:p>59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751" calcext:value-type="float">
            <text:p>7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542" calcext:value-type="float">
            <text:p>5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202" calcext:value-type="float">
            <text:p>12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1" calcext:value-type="float">
            <text:p>6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529" calcext:value-type="float">
            <text:p>52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578" calcext:value-type="float">
            <text:p>57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817" calcext:value-type="float">
            <text:p>81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1038" calcext:value-type="float">
            <text:p>10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31" calcext:value-type="float">
            <text:p>11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596" calcext:value-type="float">
            <text:p>59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538" calcext:value-type="float">
            <text:p>15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78" calcext:value-type="float">
            <text:p>37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026" calcext:value-type="float">
            <text:p>10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295" calcext:value-type="float">
            <text:p>29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385" calcext:value-type="float">
            <text:p>38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699" calcext:value-type="float">
            <text:p>69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621" calcext:value-type="float">
            <text:p>6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341" calcext:value-type="float">
            <text:p>3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548" calcext:value-type="float">
            <text:p>5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721" calcext:value-type="float">
            <text:p>7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846" calcext:value-type="float">
            <text:p>84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385" calcext:value-type="float">
            <text:p>38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672" calcext:value-type="float">
            <text:p>67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738" calcext:value-type="float">
            <text:p>7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215" calcext:value-type="float">
            <text:p>12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577" calcext:value-type="float">
            <text:p>57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416" calcext:value-type="float">
            <text:p>4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1106" calcext:value-type="float">
            <text:p>11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691" calcext:value-type="float">
            <text:p>69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369" calcext:value-type="float">
            <text:p>36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619" calcext:value-type="float">
            <text:p>6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635" calcext:value-type="float">
            <text:p>63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875" calcext:value-type="float">
            <text:p>87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635" calcext:value-type="float">
            <text:p>6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577" calcext:value-type="float">
            <text:p>57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962" calcext:value-type="float">
            <text:p>9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743" calcext:value-type="float">
            <text:p>74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354" calcext:value-type="float">
            <text:p>3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913" calcext:value-type="float">
            <text:p>9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01:35:53.42891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1T01:38:27.678526700</dc:date>
    <meta:editing-duration>PT13M44S</meta:editing-duration>
    <meta:editing-cycles>2</meta:editing-cycles>
    <meta:generator>LibreOffice/25.2.5.2$Windows_X86_64 LibreOffice_project/03d19516eb2e1dd5d4ccd751a0d6f35f35e08022</meta:generator>
    <meta:document-statistic meta:table-count="1" meta:cell-count="15547" meta:object-count="0"/>
  </office:meta>
</office:document-meta>
</file>